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Heading_20_1">
      <style:text-properties fo:color="#000000" loext:opacity="100%" officeooo:rsid="0004c8bd" officeooo:paragraph-rsid="001045e9"/>
    </style:style>
    <style:style style:name="P2" style:family="paragraph" style:parent-style-name="Heading_20_1">
      <style:text-properties fo:color="#000000" loext:opacity="100%" officeooo:paragraph-rsid="001045e9"/>
    </style:style>
    <style:style style:name="P3" style:family="paragraph" style:parent-style-name="Heading_20_1">
      <style:text-properties fo:color="#000000" loext:opacity="100%" officeooo:rsid="001045e9" officeooo:paragraph-rsid="001045e9"/>
    </style:style>
    <style:style style:name="P4" style:family="paragraph" style:parent-style-name="Standard">
      <style:text-properties officeooo:paragraph-rsid="001045e9"/>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loext:opacity="100%" fo:font-weight="bold" style:font-weight-asian="bold" style:font-weight-complex="bold"/>
    </style:style>
    <style:style style:name="T4" style:family="text">
      <style:text-properties officeooo:rsid="00050f46"/>
    </style:style>
    <style:style style:name="T5" style:family="text">
      <style:text-properties fo:font-size="28pt" fo:font-weight="bold" officeooo:rsid="001045e9" style:font-size-asian="28pt" style:font-weight-asian="bold" style:font-size-complex="2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Étudiant : </text:span>Remadji Halmadjial<text:line-break/><text:span text:style-name="T1">Filière : </text:span>Génie Informatique Niveau II<text:line-break/><text:span text:style-name="T1">Encadreur : </text:span>Ing. Betan Gildas Ongbaye<text:line-break/><text:span text:style-name="T3">Établissement </text:span>: Cefod Business School (CBS)<text:line-break/><text:span text:style-name="T2">Année académique</text:span> : 2025-2026</text:p>
      <text:p text:style-name="P4"/>
      <text:p text:style-name="P4"/>
      <text:p text:style-name="P4"><text:tab/><text:span text:style-name="T5">CAHIER DE CHARGES</text:span></text:p>
      <text:h text:style-name="P3" text:outline-level="1">PROJET : Portfolio web de l ‘agence Digitale IgoTech</text:h>
      <text:h text:style-name="P1" text:outline-level="1">1. context du projet</text:h>
      <text:p text:style-name="P4">IgoTech est une agence de communication digitale spécialisée dans la création de sites web, le marketing digital, la gestion des réseaux sociaux et la création de contenus visuels. Afin de mieux présenter ses services et ses réalisations, l’agence souhaite disposer d’un portfolio en ligne moderne et accessible.</text:p>
      <text:h text:style-name="P1" text:outline-level="1">2. problematique</text:h>
      <text:p text:style-name="P4">L’agence ne dispose pas d’une plateforme centralisée permettant de présenter efficacement ses activités. Les clients potentiels ont donc des difficultés <text:span text:style-name="T4">a</text:span> découvrir les réalisations et <text:span text:style-name="T4">a </text:span>entrer rapidement en contact avec l’équipe.</text:p>
      <text:h text:style-name="P2" text:outline-level="1">3. Objectifs du projet</text:h>
      <text:p text:style-name="P4">Concevoir un portfolio web professionnel, responsive et simple <text:span text:style-name="T4">a</text:span> administrer afin de valoriser l’image de l’agence et faciliter la prise de contact.</text:p>
      <text:h text:style-name="P2" text:outline-level="1">4. Public cible</text:h>
      <text:p text:style-name="P4">Entreprises, entrepreneurs, associations, institutions et particuliers <text:span text:style-name="T4">a</text:span> la recherche de services de communication et de marketing digital.</text:p>
      <text:h text:style-name="P2" text:outline-level="1">5. Fonctionnalités attendues</text:h>
      <text:p text:style-name="P4">- Page d’accueil attractive<text:line-break/>- Présentation de l’agence<text:line-break/>- Présentation des services<text:line-break/>- Galerie des réalisations<text:line-break/>- Témoignages clients<text:line-break/>- Formulaire de contact (Nom, Prénom, Email, Téléphone, Message)<text:line-break/>- Adaptation aux smartphones, tablettes et ordinateurs</text:p>
      <text:h text:style-name="P2" text:outline-level="1">6. Exigences techniques</text:h>
      <text:p text:style-name="P4">Le projet sera développé en HTML5 et CSS3. L’interface devra être claire, rapide et compatible avec les principaux navigateurs web.</text:p>
      <text:h text:style-name="P2" text:outline-level="1"><text:soft-page-break/>7. Architecture du site</text:h>
      <text:p text:style-name="P4">Accueil<text:line-break/><text:span text:style-name="T4">A</text:span> propos<text:line-break/>Services<text:line-break/>Réalisations<text:line-break/>Témoignages<text:line-break/>Contact<text:line-break/>Pied de page</text:p>
      <text:h text:style-name="P2" text:outline-level="1">8. Contraintes</text:h>
      <text:p text:style-name="P4">Respect des délais académiques, simplicité d’utilisation, rapidité d’affichage et design professionnel.</text:p>
      <text:h text:style-name="P2" text:outline-level="1">9. Livrables</text:h>
      <text:p text:style-name="P4">- Cahier des charges<text:line-break/>- Maquette du portfolio<text:line-break/>- Code source HTML/CSS<text:line-break/>- Dépôt GitHub du projet</text:p>
      <text:h text:style-name="P2" text:outline-level="1">10. Conclusion</text:h>
      <text:p text:style-name="P4">Ce projet permettra <text:span text:style-name="T4">a </text:span>IgoTech de disposer d’un portfolio moderne mettant en valeur ses compétences et ses réalisations. Il contribuera également <text:span text:style-name="T4">a</text:span> améliorer sa visibilité et sa communication auprès des clients potentiels.</text:p>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09T11:07:45.037797444</meta:creation-date>
    <dc:date>2026-06-09T11:18:00.190049641</dc:date>
    <meta:editing-duration>PT10M17S</meta:editing-duration>
    <meta:editing-cycles>1</meta:editing-cycles>
    <meta:document-statistic meta:table-count="0" meta:image-count="0" meta:object-count="0" meta:page-count="2" meta:paragraph-count="23" meta:word-count="310" meta:character-count="2134" meta:non-whitespace-character-count="1846"/>
    <meta:generator>LibreOffice/24.2.7.2$Linux_X86_64 LibreOffice_project/420$Build-2</meta:generator>
  </office:meta>
</office:document-meta>
</file>